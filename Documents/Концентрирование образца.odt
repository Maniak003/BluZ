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2c404"/>
    </style:style>
    <style:style style:name="P2" style:family="paragraph" style:parent-style-name="Standard">
      <style:text-properties officeooo:paragraph-rsid="0002dc0a"/>
    </style:style>
    <style:style style:name="T1" style:family="text">
      <style:text-properties officeooo:rsid="0002c404"/>
    </style:style>
    <style:style style:name="T2" style:family="text">
      <style:text-properties officeooo:rsid="0002dc0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essage-content">
        <text:section text:style-name="Sect1" text:name="messagebody">
          <text:section text:style-name="Sect1" text:name="message-htmlpart1">
            <text:p text:style-name="P2"><text:span text:style-name="T2">П</text:span>ротокол (для 100 г грунта):**</text:p>
            <text:p text:style-name="P2"><text:line-break/>1. **Выщелачивание:**<text:line-break/> - Образец + 50 мл 14% HCl → сразу нагреть до 80°C.<text:line-break/> - Перемешивать 1 ч на магнитной мешалке (800 об/мин).<text:line-break/> <text:line-break/>2. **Фильтрация:**<text:line-break/> - Горячий раствор отфильтровать → основной фильтрат (≈50 мл).<text:line-break/> - Осадок промыть 20 мл 1% HCl → объединить с основным фильтратом.</text:p>
            <text:p text:style-name="P1"><text:span text:style-name="T1"><text:s/>- Контролировать активность осадка, при необходимости, промыть повторно.</text:span><text:line-break/><text:line-break/>3. **Подготовка к сорбции:**<text:line-break/> - Общий объем ≈70 мл → разбавить 140 мл дист. воды (итого 210 мл, pH≈1.0).<text:line-break/> - Нейтрализовать 10% NaOH до pH 3.1 (индикаторная бумага).<text:line-break/> - Добавить 1 г CH₃COONH₄.<text:line-break/><text:line-break/>4. **Синтез сорбента:**<text:line-break/> - Приготовить растворы:<text:line-break/> <text:span text:style-name="T2"><text:tab/></text:span>- NiCl₂·6H₂O: 11.85 г → растворить в 20 мл воды → 0.5M раствор.<text:line-break/> <text:span text:style-name="T2"><text:tab/></text:span>- K₄[Fe(CN)₆]: 9.2 г → растворить в 20 мл воды → 0.5M раствор.<text:line-break/> - Добавить в фильтрат 5 мл 0.5M NiCl₂ (1 мл/мин).<text:line-break/> - Через 10 мин добавить 7 мл 0.5M K₄[Fe(CN)₆] (1 мл/мин).<text:line-break/> - Перемешивать 2 ч при 40°C.<text:line-break/><text:line-break/>5. **Фильтрация:**<text:line-break/> - Отфильтровать через мембрану 0.45 мкм.<text:line-break/> - Промыть осадок 20 мл 0.1М HCl.<text:line-break/><text:line-break/>**Критические предупреждения:**<text:line-break/>1. Не храните фильтрат до нейтрализации!<text:line-break/> При pH &lt;1 за 4-6 ч происходит частичное восстановление Fe³⁺→ Fe²⁺с выделением Cl₂. <text:line-break/>2. Скорость добавления K₄[Fe(CN)₆]:<text:line-break/> Используйте перистальтический насос или градуированный шприц для точного контроля 1 мл/мин.  <text:line-break/>3. Контроль температуры при нейтрализации:<text:line-break/> Добавляйте NaOH порциями по 0.5 мл при перемешивании и охлаждении колбы в ледяной бане.  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2T11:24:56.668555549</meta:creation-date>
    <dc:date>2026-06-12T11:38:41.113247088</dc:date>
    <meta:editing-duration>PT13M43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1" meta:paragraph-count="3" meta:word-count="248" meta:character-count="1417" meta:non-whitespace-character-count="1166"/>
  </office:meta>
</office:document-meta>
</file>