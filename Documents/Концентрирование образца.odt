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rcmbtnfrm101"/></text:p>
      <text:section text:style-name="Sect1" text:name="message-content">
        <text:p text:style-name="Standard"/>
        <text:section text:style-name="Sect1" text:name="message-objects">
          <text:p text:style-name="Standard"/>
        </text:section>
        <text:section text:style-name="Sect1" text:name="messagebody">
          <text:p text:style-name="Standard"/>
          <text:section text:style-name="Sect1" text:name="message-htmlpart1">
            <text:p text:style-name="Standard">протокол (для 100 г грунта):**<text:line-break/>1. **Выщелачивание:**<text:line-break/>   - Образец + 50 мл 14% HCl → **сразу нагреть до 80°C**.<text:line-break/>   - Перемешивать 1 ч на магнитной мешалке (800 об/мин).<text:line-break/>   <text:line-break/>2. **Фильтрация:**<text:line-break/>   - Горячий раствор отфильтровать → **основной фильтрат (≈50 мл)**.<text:line-break/>   - Осадок промыть **20 мл 1% HCl** → объединить с основным фильтратом.<text:line-break/><text:line-break/>3. **Подготовка к сорбции:**<text:line-break/>   - Общий объем ≈70 мл → разбавить **140 мл дист. воды** (итого 210 мл, pH≈1.0).<text:line-break/>   - **Нейтрализовать 10% NaOH до pH 3.1** (индикаторная бумага).<text:line-break/>   - Добавить 1 г CH₃COONH₄.<text:line-break/><text:line-break/>4. **Синтез сорбента:**<text:line-break/>   - Приготовить растворы:<text:line-break/>     - **NiCl₂·6H₂O**: 11.85 г → растворить в 20 мл воды → **0.5M раствор**.<text:line-break/>     - **K₄[Fe(CN)₆]**: 9.2 г → растворить в 20 мл воды → **0.5M раствор**.<text:line-break/>   - Добавить в фильтрат **5 мл 0.5M NiCl₂** (1 мл/мин).<text:line-break/>   - Через 10 мин добавить **7 мл 0.5M K₄[Fe(CN)₆]** (1 мл/мин).<text:line-break/>   - Перемешивать 2 ч при 40°C.<text:line-break/><text:line-break/>5. **Фильтрация:**<text:line-break/>   - Отфильтровать через мембрану 0.45 мкм.<text:line-break/>   - Промыть осадок 20 мл 0.1М HCl.<text:line-break/>   - **Не сушить!** Измерять активность во влажном состоянии.<text:line-break/><text:line-break/><text:line-break/>**Критические предупреждения:**<text:line-break/>1. **Не храните фильтрат до нейтрализации!**  <text:line-break/>   При pH &lt;1 за 4-6 ч происходит частичное восстановление Fe³⁺ → Fe²⁺ с выделением Cl₂.  <text:line-break/>2. **Скорость добавления K₄[Fe(CN)₆]:**  <text:line-break/>   Используйте **перистальтический насос** или градуированный шприц для точного контроля 1 мл/мин.  <text:line-break/>3. **Контроль температуры при нейтрализации:**  <text:line-break/>   Добавляйте NaOH порциями по 0.5 мл при перемешивании и охлаждении колбы в ледяной бане.  </text:p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2T11:24:56.668555549</meta:creation-date>
    <dc:date>2026-06-12T11:25:48.856453887</dc:date>
    <meta:editing-duration>PT53S</meta:editing-duration>
    <meta:editing-cycles>1</meta:editing-cycles>
    <meta:document-statistic meta:table-count="0" meta:image-count="0" meta:object-count="0" meta:page-count="1" meta:paragraph-count="1" meta:word-count="251" meta:character-count="1516" meta:non-whitespace-character-count="1212"/>
    <meta:generator>LibreOffice/7.4.7.2$Linux_X86_64 LibreOffice_project/40$Build-2</meta:generator>
  </office:meta>
</office:document-meta>
</file>